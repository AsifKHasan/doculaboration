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4377bf" officeooo:paragraph-rsid="00437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1T20:31:38.639129520</dc:date>
    <meta:editing-duration>PT3H37M9S</meta:editing-duration>
    <meta:editing-cycles>50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